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Menlo" svg:font-family="Menlo"/>
  </office:font-face-decls>
  <office:automatic-styles>
    <style:style style:name="P1" style:family="paragraph" style:parent-style-name="Standard">
      <style:text-properties style:font-name="Menlo" fo:font-size="12.0pt" fo:color="#4689cc" fo:background-color="#181818"/>
    </style:style>
    <style:style style:name="P2" style:family="paragraph" style:parent-style-name="Standard">
      <style:text-properties style:font-name="Menlo" fo:font-size="12.0pt" fo:color="#c1c1c1"/>
    </style:style>
    <style:style style:name="P3" style:family="paragraph" style:parent-style-name="Standard">
      <style:text-properties style:font-name="Menlo" fo:font-size="12.0pt" fo:color="#c1c1c1" fo:background-color="#181818"/>
    </style:style>
    <style:style style:name="P4" style:family="paragraph" style:parent-style-name="Standard">
      <style:text-properties style:font-name="Menlo" fo:font-size="12.0pt" fo:color="#c27e65" fo:background-color="#181818"/>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letter-spacing="0.0000in" fo:color="#5581e0"/>
    </style:style>
    <style:style style:name="T4" style:family="text">
      <style:text-properties fo:letter-spacing="0.0000in" fo:color="#c1c1c1"/>
    </style:style>
    <style:style style:name="T5"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text:span text:style-name="T1"># Largent Data Retention and Deletion Policy</text:span></text:p>
      <text:p text:style-name="P2"><text:span text:style-name="T2"/></text:p>
      <text:p text:style-name="P3"><text:span text:style-name="T2">Last updated: June 11, 2026</text:span></text:p>
      <text:p text:style-name="P2"><text:span text:style-name="T2"/></text:p>
      <text:p text:style-name="P1"><text:span text:style-name="T1">## Purpose</text:span></text:p>
      <text:p text:style-name="P3"><text:span text:style-name="T2">This policy describes how Largent retains, deletes, and manages user data related to accounts, budgets, subscriptions, and optional bank-connected experiences.</text:span></text:p>
      <text:p text:style-name="P2"><text:span text:style-name="T2"/></text:p>
      <text:p text:style-name="P1"><text:span text:style-name="T1">## Retention Principles</text:span></text:p>
      <text:p text:style-name="P3"><text:span text:style-name="T2">Largent aims to retain data only as long as reasonably necessary to:</text:span></text:p>
      <text:p text:style-name="P3"><text:span text:style-name="T3">-</text:span><text:span text:style-name="T2"><text:s/>provide the service requested by the user</text:span></text:p>
      <text:p text:style-name="P3"><text:span text:style-name="T3">-</text:span><text:span text:style-name="T2"><text:s/>preserve saved budgeting and spending history</text:span></text:p>
      <text:p text:style-name="P3"><text:span text:style-name="T3">-</text:span><text:span text:style-name="T2"><text:s/>operate account security and recovery workflows</text:span></text:p>
      <text:p text:style-name="P3"><text:span text:style-name="T3">-</text:span><text:span text:style-name="T2"><text:s/>support billing, auditing, and fraud prevention</text:span></text:p>
      <text:p text:style-name="P3"><text:span text:style-name="T3">-</text:span><text:span text:style-name="T2"><text:s/>comply with applicable legal obligations</text:span></text:p>
      <text:p text:style-name="P3"><text:span text:style-name="T3">-</text:span><text:span text:style-name="T2"><text:s/>resolve disputes and enforce agreements</text:span></text:p>
      <text:p text:style-name="P2"><text:span text:style-name="T2"/></text:p>
      <text:p text:style-name="P1"><text:span text:style-name="T1">## Data Categories and Retention Approach</text:span></text:p>
      <text:p text:style-name="P2"><text:span text:style-name="T2"/></text:p>
      <text:p text:style-name="P1"><text:span text:style-name="T1">### 1. Account Data</text:span></text:p>
      <text:p text:style-name="P3"><text:span text:style-name="T2">Account records such as name, email, password hash, recovery metadata, communication preferences, and entitlement state are generally retained while an account remains active.</text:span></text:p>
      <text:p text:style-name="P2"><text:span text:style-name="T2"/></text:p>
      <text:p text:style-name="P3"><text:span text:style-name="T2">If an account is deleted, Largent may retain limited records for legitimate security, fraud-prevention, tax, accounting, or legal reasons for a reasonable period.</text:span></text:p>
      <text:p text:style-name="P2"><text:span text:style-name="T2"/></text:p>
      <text:p text:style-name="P1"><text:span text:style-name="T1">### 2. Budget and Planning Data</text:span></text:p>
      <text:p text:style-name="P3"><text:span text:style-name="T2">Onboarding inputs, income estimate settings, deduction selections, ledger categories, allocations, manual transactions, and dashboard-related budgeting history may be retained while the account is active so users can return to prior saved states.</text:span></text:p>
      <text:p text:style-name="P2"><text:span text:style-name="T2"/></text:p>
      <text:p text:style-name="P1"><text:span text:style-name="T1">### 3. Plaid and Bank Connection Data</text:span></text:p>
      <text:p text:style-name="P3"><text:span text:style-name="T2">If a user connects a bank account through Plaid, Largent may retain the minimum operational data needed to maintain the connection, display synced transactions, and support budget categorization. This may include:</text:span></text:p>
      <text:p text:style-name="P3"><text:span text:style-name="T3">-</text:span><text:span text:style-name="T2"><text:s/>Plaid item identifiers</text:span></text:p>
      <text:p text:style-name="P3"><text:span text:style-name="T3">-</text:span><text:span text:style-name="T2"><text:s/>linked account metadata</text:span></text:p>
      <text:p text:style-name="P3"><text:span text:style-name="T3">-</text:span><text:span text:style-name="T2"><text:s/>synced transaction data and sync cursors</text:span></text:p>
      <text:p text:style-name="P3"><text:span text:style-name="T3">-</text:span><text:span text:style-name="T2"><text:s/>timestamps and connection state</text:span></text:p>
      <text:p text:style-name="P2"><text:span text:style-name="T2"/></text:p>
      <text:p text:style-name="P3"><text:span text:style-name="T2">If a user disconnects a bank connection, Largent should stop future syncing for that connection. Certain historical transaction records already imported into the budgeting flow may remain if they are part of the user’s saved spending history, unless deletion is specifically requested and operationally feasible.</text:span></text:p>
      <text:p text:style-name="P2"><text:span text:style-name="T2"/></text:p>
      <text:p text:style-name="P1"><text:span text:style-name="T1">### 4. Billing and Premium Data</text:span></text:p>
      <text:p text:style-name="P3"><text:span text:style-name="T2">Subscription, billing-state, promo-redemption, and entitlement records may be retained for bookkeeping, fraud prevention, support history, and reconciliation needs even after premium access ends.</text:span></text:p>
      <text:p text:style-name="P2"><text:span text:style-name="T2"/></text:p>
      <text:p text:style-name="P1"><text:span text:style-name="T1">### 5. Email and Security Event Data</text:span></text:p>
      <text:p text:style-name="P3"><text:span text:style-name="T2">Largent may retain records of welcome emails, recovery emails, reminder emails, login events, and account-change events for support, audit, and abuse-prevention purposes.</text:span></text:p>
      <text:p text:style-name="P2"><text:span text:style-name="T2"/></text:p>
      <text:p text:style-name="P1"><text:span text:style-name="T1">## User Deletion Requests</text:span></text:p>
      <text:p text:style-name="P3"><text:span text:style-name="T2">Users may request account deletion or data deletion review through Largent support.</text:span></text:p>
      <text:p text:style-name="P2"><text:span text:style-name="T2"/></text:p>
      <text:p text:style-name="P3"><text:span text:style-name="T2">When a deletion request is received, Largent may:</text:span></text:p>
      <text:p text:style-name="P3"><text:span text:style-name="T3">-</text:span><text:span text:style-name="T2"><text:s/>verify the requester’s identity</text:span></text:p>
      <text:p text:style-name="P3"><text:span text:style-name="T3">-</text:span><text:span text:style-name="T2"><text:s/>deactivate or remove access to the account</text:span></text:p>
      <text:p text:style-name="P3"><text:span text:style-name="T3">-</text:span><text:span text:style-name="T2"><text:s/>delete data that is no longer needed for legitimate operational or legal purposes</text:span></text:p>
      <text:p text:style-name="P3"><text:span text:style-name="T3">-</text:span><text:span text:style-name="T2"><text:s/>preserve limited records necessary for security, fraud prevention, accounting, compliance, backups, or dispute resolution</text:span></text:p>
      <text:p text:style-name="P2"><text:span text:style-name="T2"/></text:p>
      <text:p text:style-name="P1"><text:span text:style-name="T1">## Backups</text:span></text:p>
      <text:p text:style-name="P3"><text:span text:style-name="T2">Deleted data may persist in backups for a limited period until backup rotation cycles complete. Backup data is not intended for routine product use and should be removed through normal retention cycles where feasible.</text:span></text:p>
      <text:p text:style-name="P2"><text:span text:style-name="T2"/></text:p>
      <text:p text:style-name="P1"><text:span text:style-name="T1">## Premium Expiry and Promo Data</text:span></text:p>
      <text:p text:style-name="P3"><text:span text:style-name="T2">Promo code redemption history and premium entitlement dates may be retained after expiration in order to:</text:span></text:p>
      <text:p text:style-name="P3"><text:span text:style-name="T3">-</text:span><text:span text:style-name="T2"><text:s/>prevent duplicate or abusive use</text:span></text:p>
      <text:p text:style-name="P3"><text:span text:style-name="T3">-</text:span><text:span text:style-name="T2"><text:s/>support customer service</text:span></text:p>
      <text:p text:style-name="P3"><text:span text:style-name="T3">-</text:span><text:span text:style-name="T2"><text:s/>preserve billing and entitlement history</text:span></text:p>
      <text:p text:style-name="P2"><text:span text:style-name="T2"/></text:p>
      <text:p text:style-name="P1"><text:span text:style-name="T1">## Policy Updates</text:span></text:p>
      <text:p text:style-name="P3"><text:span text:style-name="T2">This policy may be updated as the product’s infrastructure, integrations, and legal obligations evolve.</text:span></text:p>
      <text:p text:style-name="P2"><text:span text:style-name="T2"/></text:p>
      <text:p text:style-name="P1"><text:span text:style-name="T1">## Contact</text:span></text:p>
      <text:p text:style-name="P3"><text:span text:style-name="T2">Use a monitored support or privacy contact for retention or deletion requests, such as:</text:span></text:p>
      <text:p text:style-name="P4"><text:span text:style-name="T3">-</text:span><text:span text:style-name="T4"><text:s/></text:span><text:span text:style-name="T2">`largentsupport@gmail.com`</text:span></text:p>
      <text:p text:style-name="P2"><text:span text:style-name="T2"/></text:p>
      <text:p text:style-name="P2"><text:span text:style-name="T2"/></text:p>
      <text:p text:style-name="P3"><text:span text:style-name="T2">Replace placeholders before publication.</text:span></text:p>
      <text:p text:style-name="P2"><text:span text:style-name="T2"/></text:p>
      <text:p text:style-name="P3"><text:span text:style-name="T2">---</text:span></text:p>
      <text:p text:style-name="P2"><text:span text:style-name="T2"/></text:p>
      <text:p text:style-name="P3"><text:span text:style-name="T5">*This document is an operational draft for product and compliance readiness and should be reviewed by counsel before public release.*</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6</meta:generator>
  </office:meta>
</office:document-meta>
</file>